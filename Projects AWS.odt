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0461ef" officeooo:paragraph-rsid="000461ef"/>
    </style:style>
    <style:style style:name="P2" style:family="paragraph" style:parent-style-name="Standard">
      <style:text-properties officeooo:rsid="000461ef" officeooo:paragraph-rsid="000d16d7"/>
    </style:style>
    <style:style style:name="P3" style:family="paragraph" style:parent-style-name="Standard">
      <style:text-properties officeooo:rsid="000461ef" officeooo:paragraph-rsid="0010744f"/>
    </style:style>
    <style:style style:name="P4" style:family="paragraph" style:parent-style-name="Standard">
      <style:text-properties officeooo:rsid="0006329c" officeooo:paragraph-rsid="0006329c"/>
    </style:style>
    <style:style style:name="P5" style:family="paragraph" style:parent-style-name="Standard">
      <style:text-properties officeooo:rsid="0007b175" officeooo:paragraph-rsid="0007b175"/>
    </style:style>
    <style:style style:name="P6" style:family="paragraph" style:parent-style-name="Standard">
      <style:text-properties officeooo:rsid="0007b175" officeooo:paragraph-rsid="00089feb"/>
    </style:style>
    <style:style style:name="P7" style:family="paragraph" style:parent-style-name="Standard">
      <style:text-properties officeooo:rsid="0007b175" officeooo:paragraph-rsid="000a92ec"/>
    </style:style>
    <style:style style:name="P8" style:family="paragraph" style:parent-style-name="Standard">
      <style:text-properties officeooo:paragraph-rsid="000a92ec"/>
    </style:style>
    <style:style style:name="P9" style:family="paragraph" style:parent-style-name="Standard">
      <style:paragraph-properties fo:text-align="center" style:justify-single-word="false"/>
      <style:text-properties officeooo:paragraph-rsid="000a92e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d16d7"/>
    </style:style>
    <style:style style:name="P12" style:family="paragraph" style:parent-style-name="Standard">
      <style:paragraph-properties fo:text-align="start" style:justify-single-word="false"/>
      <style:text-properties officeooo:paragraph-rsid="0010744f"/>
    </style:style>
    <style:style style:name="P13" style:family="paragraph" style:parent-style-name="Standard">
      <style:text-properties officeooo:rsid="000d16d7" officeooo:paragraph-rsid="000d16d7"/>
    </style:style>
    <style:style style:name="P14" style:family="paragraph" style:parent-style-name="Standard">
      <style:text-properties officeooo:rsid="000d16d7" officeooo:paragraph-rsid="0010744f"/>
    </style:style>
    <style:style style:name="P15" style:family="paragraph" style:parent-style-name="Standard">
      <style:text-properties officeooo:rsid="000d1f5c" officeooo:paragraph-rsid="000d1f5c"/>
    </style:style>
    <style:style style:name="P16" style:family="paragraph" style:parent-style-name="Standard">
      <style:text-properties officeooo:rsid="000d1f5c" officeooo:paragraph-rsid="0010744f"/>
    </style:style>
    <style:style style:name="P17" style:family="paragraph" style:parent-style-name="Standard">
      <style:text-properties officeooo:rsid="000f1e92" officeooo:paragraph-rsid="000f1e92"/>
    </style:style>
    <style:style style:name="P18" style:family="paragraph" style:parent-style-name="Standard">
      <style:paragraph-properties fo:text-align="center" style:justify-single-word="false"/>
      <style:text-properties officeooo:rsid="000f1e92" officeooo:paragraph-rsid="000f1e92"/>
    </style:style>
    <style:style style:name="P19" style:family="paragraph" style:parent-style-name="Standard">
      <style:text-properties officeooo:rsid="000f1e92" officeooo:paragraph-rsid="00110db6"/>
    </style:style>
    <style:style style:name="P20" style:family="paragraph" style:parent-style-name="Standard">
      <style:text-properties officeooo:rsid="0010744f" officeooo:paragraph-rsid="0010744f"/>
    </style:style>
    <style:style style:name="P21" style:family="paragraph" style:parent-style-name="Standard">
      <style:text-properties officeooo:rsid="00110db6" officeooo:paragraph-rsid="00110db6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Standard">
      <style:paragraph-properties fo:text-align="center" style:justify-single-word="false"/>
      <style:text-properties officeooo:rsid="000461ef" officeooo:paragraph-rsid="000a92ec"/>
    </style:style>
    <style:style style:name="P24" style:family="paragraph" style:parent-style-name="Standard">
      <style:paragraph-properties fo:text-align="center" style:justify-single-word="false"/>
      <style:text-properties officeooo:rsid="000461ef"/>
    </style:style>
    <style:style style:name="P25" style:family="paragraph" style:parent-style-name="Standard">
      <style:paragraph-properties fo:text-align="center" style:justify-single-word="false"/>
      <style:text-properties officeooo:rsid="000461ef" officeooo:paragraph-rsid="000d16d7"/>
    </style:style>
    <style:style style:name="P26" style:family="paragraph" style:parent-style-name="Standard">
      <style:paragraph-properties fo:text-align="center" style:justify-single-word="false"/>
      <style:text-properties officeooo:rsid="000461ef" officeooo:paragraph-rsid="0010744f"/>
    </style:style>
    <style:style style:name="P27" style:family="paragraph" style:parent-style-name="Standard">
      <style:text-properties officeooo:rsid="00089feb" officeooo:paragraph-rsid="00089feb"/>
    </style:style>
    <style:style style:name="P28" style:family="paragraph" style:parent-style-name="Standard">
      <style:text-properties officeooo:rsid="00089feb" officeooo:paragraph-rsid="000a92ec"/>
    </style:style>
    <style:style style:name="P29" style:family="paragraph" style:parent-style-name="Standard">
      <style:text-properties officeooo:rsid="000a92ec" officeooo:paragraph-rsid="000a92ec"/>
    </style:style>
    <style:style style:name="P30" style:family="paragraph" style:parent-style-name="Standard">
      <style:text-properties officeooo:rsid="000a92ec"/>
    </style:style>
    <style:style style:name="P31" style:family="paragraph" style:parent-style-name="Standard">
      <style:text-properties officeooo:rsid="000f1e92" officeooo:paragraph-rsid="00110db6"/>
    </style:style>
    <style:style style:name="P32" style:family="paragraph" style:parent-style-name="Standard">
      <style:text-properties officeooo:rsid="000f1e92" officeooo:paragraph-rsid="00142cd3"/>
    </style:style>
    <style:style style:name="P33" style:family="paragraph" style:parent-style-name="Standard">
      <style:text-properties officeooo:paragraph-rsid="00142cd3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paragraph-properties fo:margin-top="0cm" fo:margin-bottom="0cm" style:contextual-spacing="false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paragraph-properties fo:margin-top="0cm" fo:margin-bottom="0cm" style:contextual-spacing="false"/>
    </style:style>
    <style:style style:name="P40" style:family="paragraph" style:parent-style-name="Text_20_body" style:list-style-name="L4"/>
    <style:style style:name="P4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7b175"/>
    </style:style>
    <style:style style:name="T2" style:family="text">
      <style:text-properties officeooo:rsid="00089feb"/>
    </style:style>
    <style:style style:name="T3" style:family="text">
      <style:text-properties officeooo:rsid="000a92ec"/>
    </style:style>
    <style:style style:name="T4" style:family="text">
      <style:text-properties officeooo:rsid="000d16d7"/>
    </style:style>
    <style:style style:name="T5" style:family="text">
      <style:text-properties officeooo:rsid="000d1f5c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officeooo:rsid="0010744f"/>
    </style:style>
    <style:style style:name="T10" style:family="text">
      <style:text-properties officeooo:rsid="000f1e92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---Reactjs E-commerce Application ---- </text:p>
      <text:p text:style-name="P8"/>
      <text:p text:style-name="P23">Application Deployment</text:p>
      <text:p text:style-name="P24">(Deploy the given react application to a production ready state)</text:p>
      <text:p text:style-name="Standard"/>
      <text:p text:style-name="P1">Application:</text:p>
      <text:p text:style-name="P1">Clone the below mentioned repo and deploy the application. ( Run the applicaiton in port 80 HTTP)</text:p>
      <text:p text:style-name="P1">https://github.com/sriram-R-krishnan/devops-build</text:p>
      <text:p text:style-name="P1"/>
      <text:p text:style-name="P4">Docker: </text:p>
      <text:p text:style-name="P4">1. Dockertize the application by creating a Dockerfile</text:p>
      <text:p text:style-name="P4">2. Create a docker – compose file use the above image</text:p>
      <text:p text:style-name="P4"/>
      <text:p text:style-name="P4">Bash Scripting: </text:p>
      <text:p text:style-name="P4">write 2 scripts</text:p>
      <text:p text:style-name="P4">1. build.sh- for building for docker images</text:p>
      <text:p text:style-name="P4">2. deploy.sh – for deploying the image to server.</text:p>
      <text:p text:style-name="P4"/>
      <text:p text:style-name="P4">Version Control:</text:p>
      <text:p text:style-name="P4">1. Push the code to github to dev branch (use dockerignore &amp; gitignore files)</text:p>
      <text:p text:style-name="P4">2. Note: Use only CLI for related git commands</text:p>
      <text:p text:style-name="P4"/>
      <text:p text:style-name="P4">Docker Hub</text:p>
      <text:p text:style-name="P4">1. Create 2 repo “dev” and “prod” to push images. “Prod” repo must be private and “dev” repo can be <text:span text:style-name="T1">public</text:span></text:p>
      <text:p text:style-name="P4"/>
      <text:p text:style-name="P5">Jenkins:</text:p>
      <text:p text:style-name="P5">1. Install and configure jenkins build step as per need to build, push &amp; deploy the application.</text:p>
      <text:p text:style-name="P6">2. Connect jenkin<text:span text:style-name="T2">s to the github repo with auto build trigger from both dev &amp; master branch</text:span></text:p>
      <text:p text:style-name="P27">3. If code push to dev branch, docker image must build and pushed to dev repo in docker hub.</text:p>
      <text:p text:style-name="P27">4. If dev merged to master, the dockeer image must be pushed to prod repo in docker hub.</text:p>
      <text:p text:style-name="P6"/>
      <text:p text:style-name="P27">AWS: </text:p>
      <text:p text:style-name="P27">Launch t2.micro instance and deploy the create application.</text:p>
      <text:p text:style-name="P27">Configure SG as below: </text:p>
      <text:p text:style-name="P6">--- <text:span text:style-name="T2">Whoever has the ip address can access the application.</text:span></text:p>
      <text:p text:style-name="P6">--- <text:span text:style-name="T2">Login to server can should be made only from your ip address</text:span></text:p>
      <text:p text:style-name="P6"/>
      <text:p text:style-name="P27">Monitoring: </text:p>
      <text:p text:style-name="P27">1. Setup a monitoring system to check health status of the applicaiton (Open Source)</text:p>
      <text:p text:style-name="P27">2. Sending notifications only if the applicaiton goes down is highly appreciable</text:p>
      <text:p text:style-name="P6"/>
      <text:p text:style-name="P27">Submission: </text:p>
      <text:p text:style-name="P28">1. Github repo URL, deployed site URL, Docker images name must be added in the submission.</text:p>
      <text:p text:style-name="P7"><text:span text:style-name="T3">2. Upload the screenshorts </text:span><text:s/><text:span text:style-name="T3">of below mentioned to github repo:</text:span></text:p>
      <text:p text:style-name="P29"><text:tab/>1. Jenkins ( login page, configuration setting, execute step commands)</text:p>
      <text:p text:style-name="P7"><text:tab/><text:span text:style-name="T3">2. AWS (EC2-Console, SG configs)</text:span></text:p>
      <text:p text:style-name="P30"><text:tab/>3. Docker hub repo with image tags</text:p>
      <text:p text:style-name="Standard"><text:tab/><text:span text:style-name="T3">4. Deployed site page</text:span></text:p>
      <text:p text:style-name="P30"><text:tab/>5. Monitoring the health check status</text:p>
      <text:p text:style-name="Standard"/>
      <text:p text:style-name="Standard"/>
      <text:p text:style-name="Standard"><text:soft-page-break/></text:p>
      <text:p text:style-name="P10">TrendStore</text:p>
      <text:p text:style-name="Standard"/>
      <text:p text:style-name="P25">Application Deployment</text:p>
      <text:p text:style-name="P25">(Deploy the given react application to a production ready state)</text:p>
      <text:p text:style-name="P11"/>
      <text:p text:style-name="P2">Application:</text:p>
      <text:p text:style-name="P2">Clone the below mentioned repo and deploy the application. ( Run the applicaiton in port <text:span text:style-name="T4">3000 </text:span>)</text:p>
      <text:p text:style-name="P2"><text:bookmark text:name="docs-internal-guid-8b05f067-7fff-2dde-322b-7bebd538e54b"/><text:span text:style-name="T6"> </text:span><text:a xlink:type="simple" xlink:href="https://github.com/Vennilavanguvi/Trend.git" text:style-name="Internet_20_link" text:visited-style-name="Visited_20_Internet_20_Link"><text:span text:style-name="T8">https://github.com/Vennilavanguvi/Trend.git</text:span></text:a></text:p>
      <text:p text:style-name="P2"/>
      <text:p text:style-name="P13">Docker:</text:p>
      <text:p text:style-name="P13">1. Dockerize the application by creating Dockerfile.</text:p>
      <text:p text:style-name="P13">2. Build an applicaiton and check output using the docker image.</text:p>
      <text:p text:style-name="P13"/>
      <text:p text:style-name="P13">Terraform: </text:p>
      <text:p text:style-name="P13">1. <text:span text:style-name="T5">Define infrastructure in main.tf to create VPC, EC2, IAM with jenkins etc.</text:span></text:p>
      <text:p text:style-name="P15">2. Use terraform command to provision infrastructure.</text:p>
      <text:p text:style-name="P15"/>
      <text:p text:style-name="P15">DockerHub: </text:p>
      <text:p text:style-name="P15">1. Create a Dockerhub repository.</text:p>
      <text:p text:style-name="P15"/>
      <text:p text:style-name="P15">Kubernetes:</text:p>
      <text:p text:style-name="P15">1. Setup Kubernetes in AWS EKS and confirm EKS cluster is running.</text:p>
      <text:p text:style-name="P15">2. Write deployment and service YAML files.</text:p>
      <text:p text:style-name="P15">3. Deploy using Kubectl via jenkins.</text:p>
      <text:p text:style-name="P15"/>
      <text:p text:style-name="P15">Version Control:</text:p>
      <text:p text:style-name="P15">1. Push the codebase to a Git provider (Github).</text:p>
      <text:p text:style-name="P15">2. Add gitignore and dockerignnore files and use CLI commands to push code.</text:p>
      <text:p text:style-name="P15"/>
      <text:p text:style-name="P15">Jenkins:</text:p>
      <text:p text:style-name="P15">1. Install jening and necessary plugins ( Docker, Git, Kubernets, Pipeline ) for build, push &amp; deploy applicaitons.</text:p>
      <text:p text:style-name="P15">2. Setup Github and Jenkins integration using githubwebhook trigger for auto build for every commit.</text:p>
      <text:p text:style-name="P15">3. Create a declarative pipleline script and <text:tab/>pipeline project to build, push &amp; deploy using CI – CD.</text:p>
      <text:p text:style-name="P17"/>
      <text:p text:style-name="P17">Monitoring: </text:p>
      <text:p text:style-name="P17">1. Setup a monitoring system to check the health of the cluster or applicaiton ( open souce ) is highly appreciable.</text:p>
      <text:p text:style-name="P17"/>
      <text:p text:style-name="P17">Submission Guidelines:</text:p>
      <text:p text:style-name="P17">1. Github link : Submit full code repository.</text:p>
      <text:p text:style-name="P17">2. Readme File: Include setup instructions, pipeline explanation and screenshots or create a document and attach all screenshots.</text:p>
      <text:p text:style-name="P17">3. Applicaiton deployed kubernetes Loadbalancer ARN.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MindTrack</text:p>
      <text:p text:style-name="P18"/>
      <text:p text:style-name="P26">Application Deployment</text:p>
      <text:p text:style-name="P26">(Deploy the given react application to a production ready state)</text:p>
      <text:p text:style-name="P12"/>
      <text:p text:style-name="P3">Application:</text:p>
      <text:p text:style-name="P3">Clone the below mentioned repo and deploy the application. ( Run the applicaiton in port <text:span text:style-name="T4">3000 </text:span>)</text:p>
      <text:p text:style-name="P3"><text:bookmark text:name="docs-internal-guid-225746aa-7fff-d5ed-b63c-ca5e8135de38"/><text:span text:style-name="T7">Repo URL : </text:span><text:a xlink:type="simple" xlink:href="https://github.com/Vennilavanguvi/Brain-Tasks-App.git" text:style-name="Internet_20_link" text:visited-style-name="Visited_20_Internet_20_Link"><text:span text:style-name="T8">https://github.com/Vennilavanguvi/Brain-Tasks-App.git</text:span></text:a></text:p>
      <text:p text:style-name="P3"/>
      <text:p text:style-name="P14">Docker:</text:p>
      <text:p text:style-name="P14">1. Dockerize the application by creating Dockerfile.</text:p>
      <text:p text:style-name="P14">2. Build an applicaiton and check output using the docker image.</text:p>
      <text:p text:style-name="P14"/>
      <text:p text:style-name="P20">Registry:</text:p>
      <text:p text:style-name="P20">1. Create an AWS ECR or Dockerhub respository for storing docker images.</text:p>
      <text:p text:style-name="P20"/>
      <text:p text:style-name="P16">Kubernetes:</text:p>
      <text:p text:style-name="P16">1. Setup Kubernetes in AWS EKS and confirm EKS cluster is running.</text:p>
      <text:p text:style-name="P16">2. Write deployment and service YAML files.</text:p>
      <text:p text:style-name="P16">3. Deploy using Kubectl <text:span text:style-name="T9">via codebuild or codepipeline.</text:span></text:p>
      <text:p text:style-name="P16"/>
      <text:p text:style-name="P20">CodeBuild: </text:p>
      <text:p text:style-name="P20">1. Create a Codebuld project:</text:p>
      <text:p text:style-name="P20">2. Source: Connect to your repository</text:p>
      <text:p text:style-name="P20">3. Environment: Use managed image ( Amazon Linux, Ubuntu )</text:p>
      <text:p text:style-name="P20">4. Write and define commands in buildspec.yml.</text:p>
      <text:p text:style-name="P20"/>
      <text:p text:style-name="P20">Version Control: </text:p>
      <text:p text:style-name="P20">1. Push the codebase to a Git provider (Github).</text:p>
      <text:p text:style-name="P20">2. Use CLI commands to Push Code.</text:p>
      <text:p text:style-name="P20"/>
      <text:p text:style-name="P20">CodePipeline:</text:p>
      <text:p text:style-name="P20">1. Source: GitHub</text:p>
      <text:p text:style-name="P20">2. Build: AWS Codebuild project</text:p>
      <text:p text:style-name="P20">3. Deploy: Deploy to EKS via Codepipeline EKS deploy stage..</text:p>
      <text:p text:style-name="P20"/>
      <text:p text:style-name="P20">Monitoring :</text:p>
      <text:p text:style-name="P21">1. Use Cloudwatch logs to track build, deploy, and application logs.</text:p>
      <text:p text:style-name="P21"/>
      <text:p text:style-name="P19">Submission Guidelines:</text:p>
      <text:p text:style-name="P19">1. Github link : Submit full code repository.</text:p>
      <text:p text:style-name="P19">2. Readme File: Include setup instructions, pipeline explanation and screenshots or create a document and attach all screenshots.</text:p>
      <text:p text:style-name="P19">3. Applicaiton deployed kubernetes Loadbalancer ARN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# MindTrack DevOps Project</text:p>
      <text:p text:style-name="P19"/>
      <text:p text:style-name="P19">## Project Overview</text:p>
      <text:p text:style-name="P19"/>
      <text:p text:style-name="P19">MindTrack is a React-based task management application deployed using a complete DevOps pipeline on AWS.</text:p>
      <text:p text:style-name="P19"/>
      <text:p text:style-name="P19">This project demonstrates:</text:p>
      <text:p text:style-name="P19"/>
      <text:p text:style-name="P19">- React Application Deployment</text:p>
      <text:p text:style-name="P19">- Docker Containerization</text:p>
      <text:p text:style-name="P19">- Kubernetes Orchestration using AWS EKS</text:p>
      <text:p text:style-name="P19">- CI/CD Automation using AWS CodeBuild and CodePipeline</text:p>
      <text:p text:style-name="P19">- Monitoring using AWS CloudWatch</text:p>
      <text:p text:style-name="P19">- GitHub Integration</text:p>
      <text:p text:style-name="P19"/>
      <text:p text:style-name="P19">The application runs on Port 3000 and is deployed using Kubernetes LoadBalancer service.</text:p>
      <text:p text:style-name="P19"/>
      <text:p text:style-name="P19">---</text:p>
      <text:p text:style-name="P19"/>
      <text:p text:style-name="P19"># Architecture Diagram</text:p>
      <text:p text:style-name="P19"/>
      <text:p text:style-name="P19">```text</text:p>
      <text:p text:style-name="P19"><text:s text:c="20"/>+------------------+</text:p>
      <text:p text:style-name="P19"><text:s text:c="20"/>| <text:s text:c="2"/>GitHub Repo <text:s text:c="3"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AWS CodePipeline 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AWS CodeBuild <text:s text:c="3"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Docker Image <text:s text:c="4"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DockerHub / ECR <text:s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AWS EKS Cluster <text:s/>|</text:p>
      <text:p text:style-name="P19"><text:soft-page-break/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Kubernetes Pods <text:s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LoadBalancer <text:s text:c="4"/>|</text:p>
      <text:p text:style-name="P19"><text:s text:c="20"/>+------------------+</text:p>
      <text:p text:style-name="P19"><text:s text:c="30"/>|</text:p>
      <text:p text:style-name="P19"><text:s text:c="30"/>v</text:p>
      <text:p text:style-name="P19"><text:s text:c="20"/>+------------------+</text:p>
      <text:p text:style-name="P19"><text:s text:c="20"/>| React Application|</text:p>
      <text:p text:style-name="P33"><text:span text:style-name="T10"><text:s text:c="20"/>+------------------+ <text:s text:c="111"/></text:span></text:p>
      <text:h text:style-name="Heading_20_1" text:outline-level="1">Project Repository</text:h>
      <text:p text:style-name="Text_20_body">GitHub Repository:</text:p>
      <text:p text:style-name="Text_20_body">https://github.com/Vennilavanguvi/Brain-Tasks-App.git</text:p>
      <text:p text:style-name="Horizontal_20_Line"/>
      <text:h text:style-name="Heading_20_1" text:outline-level="1">Setup Steps</text:h>
      <text:h text:style-name="Heading_20_2" text:outline-level="2">Step 1 — Launch EC2 Instance</text:h>
      <text:list xml:id="list3201465752" text:style-name="L1">
        <text:list-item>
          <text:p text:style-name="P35">Ubuntu 22.04 </text:p>
        </text:list-item>
        <text:list-item>
          <text:p text:style-name="P35">t2.medium </text:p>
        </text:list-item>
        <text:list-item>
          <text:p text:style-name="P34">25 GB storage </text:p>
        </text:list-item>
      </text:list>
      <text:p text:style-name="Text_20_body">Open Ports:</text:p>
      <text:list xml:id="list961816177" text:style-name="L2">
        <text:list-item>
          <text:p text:style-name="P37">22 </text:p>
        </text:list-item>
        <text:list-item>
          <text:p text:style-name="P37">80 </text:p>
        </text:list-item>
        <text:list-item>
          <text:p text:style-name="P37">443 </text:p>
        </text:list-item>
        <text:list-item>
          <text:p text:style-name="P36">3000 </text:p>
        </text:list-item>
      </text:list>
      <text:p text:style-name="Text_20_body">Connect to EC2:</text:p>
      <text:section text:style-name="Sect1" text:name="code-block-viewer">
        <text:p text:style-name="P22"><text:span text:style-name="Source_20_Text">ssh -i key.pem ubuntu@&lt;PUBLIC-IP&gt;</text:span></text:p>
      </text:section>
      <text:p text:style-name="Horizontal_20_Line"/>
      <text:h text:style-name="Heading_20_2" text:outline-level="2">Step 2 — Install Required Tools</text:h>
      <text:h text:style-name="Heading_20_3" text:outline-level="3">Update Packages</text:h>
      <text:section text:style-name="Sect1" text:name="Section1">
        <text:p text:style-name="P22"><text:bookmark text:name="code-block-viewer"/><text:span text:style-name="Source_20_Text">sudo apt update &amp;&amp; sudo apt upgrade -y</text:span></text:p>
      </text:section>
      <text:h text:style-name="Heading_20_3" text:outline-level="3"><text:soft-page-break/>Install Git</text:h>
      <text:section text:style-name="Sect1" text:name="Section2">
        <text:p text:style-name="P22"><text:bookmark text:name="code-block-viewer1"/><text:span text:style-name="Source_20_Text">sudo apt install git -y</text:span></text:p>
      </text:section>
      <text:h text:style-name="Heading_20_3" text:outline-level="3">Install NodeJS</text:h>
      <text:section text:style-name="Sect1" text:name="Section3">
        <text:p text:style-name="Preformatted_20_Text"><text:bookmark text:name="code-block-viewer2"/><text:span text:style-name="Source_20_Text">curl -fsSL https://deb.nodesource.com/setup_18.x | sudo -E bash -</text:span></text:p>
        <text:p text:style-name="P22"><text:span text:style-name="Source_20_Text">sudo apt install -y nodejs</text:span></text:p>
      </text:section>
      <text:h text:style-name="Heading_20_3" text:outline-level="3">Install Docker</text:h>
      <text:section text:style-name="Sect1" text:name="Section4">
        <text:p text:style-name="Preformatted_20_Text"><text:bookmark text:name="code-block-viewer3"/><text:span text:style-name="Source_20_Text">sudo apt install docker.io -y</text:span></text:p>
        <text:p text:style-name="Preformatted_20_Text"><text:span text:style-name="Source_20_Text">sudo systemctl start docker</text:span></text:p>
        <text:p text:style-name="P22"><text:span text:style-name="Source_20_Text">sudo systemctl enable docker</text:span></text:p>
      </text:section>
      <text:h text:style-name="Heading_20_3" text:outline-level="3">Add Docker Permissions</text:h>
      <text:section text:style-name="Sect1" text:name="Section5">
        <text:p text:style-name="Preformatted_20_Text"><text:bookmark text:name="code-block-viewer4"/><text:span text:style-name="Source_20_Text">sudo usermod -aG docker ubuntu</text:span></text:p>
        <text:p text:style-name="P22"><text:span text:style-name="Source_20_Text">newgrp docker</text:span></text:p>
      </text:section>
      <text:h text:style-name="Heading_20_3" text:outline-level="3">Install AWS CLI</text:h>
      <text:section text:style-name="Sect1" text:name="Section6">
        <text:p text:style-name="Preformatted_20_Text"><text:bookmark text:name="code-block-viewer5"/><text:span text:style-name="Source_20_Text">curl "https://awscli.amazonaws.com/awscli-exe-linux-x86_64.zip" -o "awscliv2.zip"</text:span></text:p>
        <text:p text:style-name="Preformatted_20_Text"><text:span text:style-name="Source_20_Text">unzip awscliv2.zip</text:span></text:p>
        <text:p text:style-name="P22"><text:span text:style-name="Source_20_Text">sudo ./aws/install</text:span></text:p>
      </text:section>
      <text:p text:style-name="Text_20_body">Configure AWS:</text:p>
      <text:section text:style-name="Sect1" text:name="Section7">
        <text:p text:style-name="P22"><text:bookmark text:name="code-block-viewer6"/><text:span text:style-name="Source_20_Text">aws configure</text:span></text:p>
      </text:section>
      <text:p text:style-name="Horizontal_20_Line"/>
      <text:h text:style-name="Heading_20_2" text:outline-level="2">Step 3 — Clone Repository</text:h>
      <text:section text:style-name="Sect1" text:name="Section8">
        <text:p text:style-name="Preformatted_20_Text"><text:bookmark text:name="code-block-viewer7"/><text:span text:style-name="Source_20_Text">git clone https://github.com/Vennilavanguvi/Brain-Tasks-App.git</text:span></text:p>
        <text:p text:style-name="P22"><text:span text:style-name="Source_20_Text">cd Brain-Tasks-App</text:span></text:p>
      </text:section>
      <text:p text:style-name="Text_20_body">Install Dependencies:</text:p>
      <text:section text:style-name="Sect1" text:name="Section9">
        <text:p text:style-name="P22"><text:bookmark text:name="code-block-viewer8"/><text:span text:style-name="Source_20_Text">npm install</text:span></text:p>
      </text:section>
      <text:p text:style-name="Text_20_body">Run Application:</text:p>
      <text:section text:style-name="Sect1" text:name="Section10">
        <text:p text:style-name="P22"><text:bookmark text:name="code-block-viewer9"/><text:span text:style-name="Source_20_Text">npm start</text:span></text:p>
      </text:section>
      <text:p text:style-name="Text_20_body">Application URL:</text:p>
      <text:section text:style-name="Sect1" text:name="Section11">
        <text:p text:style-name="P22"><text:bookmark text:name="code-block-viewer10"/><text:span text:style-name="Source_20_Text">http://&lt;EC2-PUBLIC-IP&gt;:3000</text:span></text:p>
      </text:section>
      <text:p text:style-name="Horizontal_20_Line"/>
      <text:h text:style-name="Heading_20_1" text:outline-level="1"><text:soft-page-break/>Docker Commands</text:h>
      <text:h text:style-name="Heading_20_2" text:outline-level="2">Create Dockerfile</text:h>
      <text:section text:style-name="Sect1" text:name="Section12">
        <text:p text:style-name="Preformatted_20_Text"><text:bookmark text:name="code-block-viewer11"/><text:span text:style-name="Source_20_Text">FROM node:18</text:span></text:p>
        <text:p text:style-name="Preformatted_20_Text"><text:span text:style-name="Source_20_Text">WORKDIR /app</text:span></text:p>
        <text:p text:style-name="Preformatted_20_Text"><text:span text:style-name="Source_20_Text">COPY package*.json ./</text:span></text:p>
        <text:p text:style-name="Preformatted_20_Text"><text:span text:style-name="Source_20_Text">RUN npm install</text:span></text:p>
        <text:p text:style-name="Preformatted_20_Text"><text:span text:style-name="Source_20_Text">COPY . .</text:span></text:p>
        <text:p text:style-name="Preformatted_20_Text"><text:span text:style-name="Source_20_Text">EXPOSE 3000</text:span></text:p>
        <text:p text:style-name="P22"><text:span text:style-name="Source_20_Text">CMD ["npm", "start"]</text:span></text:p>
      </text:section>
      <text:p text:style-name="Horizontal_20_Line"/>
      <text:h text:style-name="Heading_20_2" text:outline-level="2">Build Docker Image</text:h>
      <text:section text:style-name="Sect1" text:name="Section13">
        <text:p text:style-name="P22"><text:bookmark text:name="code-block-viewer12"/><text:span text:style-name="Source_20_Text">docker build -t brain-task-app .</text:span></text:p>
      </text:section>
      <text:h text:style-name="Heading_20_2" text:outline-level="2">Check Docker Images</text:h>
      <text:section text:style-name="Sect1" text:name="Section14">
        <text:p text:style-name="P22"><text:bookmark text:name="code-block-viewer13"/><text:span text:style-name="Source_20_Text">docker images</text:span></text:p>
      </text:section>
      <text:h text:style-name="Heading_20_2" text:outline-level="2">Run Docker Container</text:h>
      <text:section text:style-name="Sect1" text:name="Section15">
        <text:p text:style-name="P22"><text:bookmark text:name="code-block-viewer14"/><text:span text:style-name="Source_20_Text">docker run -d -p 3000:3000 brain-task-app</text:span></text:p>
      </text:section>
      <text:h text:style-name="Heading_20_2" text:outline-level="2">Check Running Containers</text:h>
      <text:section text:style-name="Sect1" text:name="Section16">
        <text:p text:style-name="P22"><text:bookmark text:name="code-block-viewer15"/><text:span text:style-name="Source_20_Text">docker ps</text:span></text:p>
      </text:section>
      <text:p text:style-name="Horizontal_20_Line"/>
      <text:h text:style-name="Heading_20_2" text:outline-level="2">Push Image to DockerHub</text:h>
      <text:p text:style-name="Text_20_body">Login:</text:p>
      <text:section text:style-name="Sect1" text:name="Section17">
        <text:p text:style-name="P22"><text:bookmark text:name="code-block-viewer16"/><text:span text:style-name="Source_20_Text">docker login</text:span></text:p>
      </text:section>
      <text:p text:style-name="Text_20_body">Tag Image:</text:p>
      <text:section text:style-name="Sect1" text:name="Section18">
        <text:p text:style-name="P22"><text:bookmark text:name="code-block-viewer17"/><text:span text:style-name="Source_20_Text">docker tag brain-task-app YOUR_USERNAME/brain-task-app:latest</text:span></text:p>
      </text:section>
      <text:p text:style-name="Text_20_body">Push Image:</text:p>
      <text:section text:style-name="Sect1" text:name="Section19">
        <text:p text:style-name="P22"><text:bookmark text:name="code-block-viewer18"/><text:span text:style-name="Source_20_Text">docker push YOUR_USERNAME/brain-task-app:latest</text:span></text:p>
      </text:section>
      <text:p text:style-name="Horizontal_20_Line"/>
      <text:h text:style-name="Heading_20_1" text:outline-level="1"><text:soft-page-break/>Kubernetes Commands</text:h>
      <text:h text:style-name="Heading_20_2" text:outline-level="2">Install kubectl</text:h>
      <text:section text:style-name="Sect1" text:name="Section20">
        <text:p text:style-name="Preformatted_20_Text"><text:bookmark text:name="code-block-viewer19"/><text:span text:style-name="Source_20_Text">curl -LO "https://dl.k8s.io/release/$(curl -L -s https://dl.k8s.io/release/stable.txt)/bin/linux/amd64/kubectl"</text:span></text:p>
        <text:p text:style-name="Preformatted_20_Text"><text:span text:style-name="Source_20_Text">chmod +x kubectl</text:span></text:p>
        <text:p text:style-name="P22"><text:span text:style-name="Source_20_Text">sudo mv kubectl /usr/local/bin/</text:span></text:p>
      </text:section>
      <text:p text:style-name="Horizontal_20_Line"/>
      <text:h text:style-name="Heading_20_2" text:outline-level="2">Install eksctl</text:h>
      <text:section text:style-name="Sect1" text:name="Section21">
        <text:p text:style-name="Preformatted_20_Text"><text:bookmark text:name="code-block-viewer20"/><text:span text:style-name="Source_20_Text">curl --silent --location \</text:span></text:p>
        <text:p text:style-name="Preformatted_20_Text"><text:span text:style-name="Source_20_Text">"https://github.com/weaveworks/eksctl/releases/latest/download/eksctl_$(uname -s)_amd64.tar.gz" \</text:span></text:p>
        <text:p text:style-name="Preformatted_20_Text"><text:span text:style-name="Source_20_Text">| tar xz -C /tmp</text:span></text:p>
        <text:p text:style-name="P22"><text:span text:style-name="Source_20_Text">sudo mv /tmp/eksctl /usr/local/bin</text:span></text:p>
      </text:section>
      <text:p text:style-name="Horizontal_20_Line"/>
      <text:h text:style-name="Heading_20_2" text:outline-level="2">Create EKS Cluster</text:h>
      <text:section text:style-name="Sect1" text:name="Section22">
        <text:p text:style-name="Preformatted_20_Text"><text:bookmark text:name="code-block-viewer21"/><text:span text:style-name="Source_20_Text">eksctl create cluster \</text:span></text:p>
        <text:p text:style-name="Preformatted_20_Text"><text:span text:style-name="Source_20_Text">--name brain-task-cluster \</text:span></text:p>
        <text:p text:style-name="Preformatted_20_Text"><text:span text:style-name="Source_20_Text">--region ap-south-1 \</text:span></text:p>
        <text:p text:style-name="Preformatted_20_Text"><text:span text:style-name="Source_20_Text">--nodegroup-name linux-nodes \</text:span></text:p>
        <text:p text:style-name="Preformatted_20_Text"><text:span text:style-name="Source_20_Text">--node-type t2.medium \</text:span></text:p>
        <text:p text:style-name="P22"><text:span text:style-name="Source_20_Text">--nodes 2</text:span></text:p>
      </text:section>
      <text:p text:style-name="Text_20_body">Check Nodes:</text:p>
      <text:section text:style-name="Sect1" text:name="Section23">
        <text:p text:style-name="P22"><text:bookmark text:name="code-block-viewer22"/><text:span text:style-name="Source_20_Text">kubectl get nodes</text:span></text:p>
      </text:section>
      <text:p text:style-name="Horizontal_20_Line"/>
      <text:h text:style-name="Heading_20_2" text:outline-level="2">deployment.yaml</text:h>
      <text:section text:style-name="Sect1" text:name="Section24">
        <text:p text:style-name="Preformatted_20_Text"><text:bookmark text:name="code-block-viewer23"/><text:span text:style-name="Source_20_Text">apiVersion: apps/v1</text:span></text:p>
        <text:p text:style-name="Preformatted_20_Text"><text:span text:style-name="Source_20_Text">kind: Deployment</text:span></text:p>
        <text:p text:style-name="Preformatted_20_Text"><text:span text:style-name="Source_20_Text">metadata:</text:span></text:p>
        <text:p text:style-name="Preformatted_20_Text"><text:span text:style-name="Source_20_Text"><text:s text:c="2"/>name: brain-task-deployment</text:span></text:p>
        <text:p text:style-name="Preformatted_20_Text"><text:span text:style-name="Source_20_Text">spec:</text:span></text:p>
        <text:p text:style-name="Preformatted_20_Text"><text:span text:style-name="Source_20_Text"><text:s text:c="2"/>replicas: 2</text:span></text:p>
        <text:p text:style-name="Preformatted_20_Text"><text:span text:style-name="Source_20_Text"><text:s text:c="2"/>selector:</text:span></text:p>
        <text:p text:style-name="Preformatted_20_Text"><text:span text:style-name="Source_20_Text"><text:s text:c="4"/>matchLabels:</text:span></text:p>
        <text:p text:style-name="Preformatted_20_Text"><text:span text:style-name="Source_20_Text"><text:s text:c="6"/>app: brain-task-app</text:span></text:p>
        <text:p text:style-name="Preformatted_20_Text"><text:span text:style-name="Source_20_Text"><text:s text:c="2"/>template:</text:span></text:p>
        <text:p text:style-name="Preformatted_20_Text"><text:span text:style-name="Source_20_Text"><text:s text:c="4"/>metadata:</text:span></text:p>
        <text:p text:style-name="Preformatted_20_Text"><text:span text:style-name="Source_20_Text"><text:s text:c="6"/>labels:</text:span></text:p>
        <text:p text:style-name="Preformatted_20_Text"><text:span text:style-name="Source_20_Text"><text:s text:c="8"/>app: brain-task-app</text:span></text:p>
        <text:p text:style-name="Preformatted_20_Text"><text:span text:style-name="Source_20_Text"><text:s text:c="4"/>spec:</text:span></text:p>
        <text:p text:style-name="Preformatted_20_Text"><text:span text:style-name="Source_20_Text"><text:s text:c="6"/>containers:</text:span></text:p>
        <text:p text:style-name="Preformatted_20_Text"><text:span text:style-name="Source_20_Text"><text:s text:c="6"/>- name: brain-task-app</text:span></text:p>
        <text:p text:style-name="Preformatted_20_Text"><text:span text:style-name="Source_20_Text"><text:s text:c="8"/>image: YOUR_USERNAME/brain-task-app:latest</text:span></text:p>
        <text:p text:style-name="Preformatted_20_Text"><text:span text:style-name="Source_20_Text"><text:s text:c="8"/>ports:</text:span></text:p>
        <text:p text:style-name="P22"><text:span text:style-name="Source_20_Text"><text:s text:c="8"/>- containerPort: 3000</text:span></text:p>
      </text:section>
      <text:p text:style-name="Horizontal_20_Line"><text:soft-page-break/></text:p>
      <text:h text:style-name="Heading_20_2" text:outline-level="2">service.yaml</text:h>
      <text:section text:style-name="Sect1" text:name="Section25">
        <text:p text:style-name="Preformatted_20_Text"><text:bookmark text:name="code-block-viewer24"/><text:span text:style-name="Source_20_Text">apiVersion: v1</text:span></text:p>
        <text:p text:style-name="Preformatted_20_Text"><text:span text:style-name="Source_20_Text">kind: Service</text:span></text:p>
        <text:p text:style-name="Preformatted_20_Text"><text:span text:style-name="Source_20_Text">metadata:</text:span></text:p>
        <text:p text:style-name="Preformatted_20_Text"><text:span text:style-name="Source_20_Text"><text:s text:c="2"/>name: brain-task-service</text:span></text:p>
        <text:p text:style-name="Preformatted_20_Text"><text:span text:style-name="Source_20_Text">spec:</text:span></text:p>
        <text:p text:style-name="Preformatted_20_Text"><text:span text:style-name="Source_20_Text"><text:s text:c="2"/>type: LoadBalancer</text:span></text:p>
        <text:p text:style-name="Preformatted_20_Text"><text:span text:style-name="Source_20_Text"><text:s text:c="2"/>selector:</text:span></text:p>
        <text:p text:style-name="Preformatted_20_Text"><text:span text:style-name="Source_20_Text"><text:s text:c="4"/>app: brain-task-app</text:span></text:p>
        <text:p text:style-name="Preformatted_20_Text"><text:span text:style-name="Source_20_Text"><text:s text:c="2"/>ports:</text:span></text:p>
        <text:p text:style-name="Preformatted_20_Text"><text:span text:style-name="Source_20_Text"><text:s text:c="4"/>- protocol: TCP</text:span></text:p>
        <text:p text:style-name="Preformatted_20_Text"><text:span text:style-name="Source_20_Text"><text:s text:c="6"/>port: 3000</text:span></text:p>
        <text:p text:style-name="P22"><text:span text:style-name="Source_20_Text"><text:s text:c="6"/>targetPort: 3000</text:span></text:p>
      </text:section>
      <text:p text:style-name="Horizontal_20_Line"/>
      <text:h text:style-name="Heading_20_2" text:outline-level="2">Deploy Application</text:h>
      <text:section text:style-name="Sect1" text:name="Section26">
        <text:p text:style-name="Preformatted_20_Text"><text:bookmark text:name="code-block-viewer25"/><text:span text:style-name="Source_20_Text">kubectl apply -f deployment.yaml</text:span></text:p>
        <text:p text:style-name="P22"><text:span text:style-name="Source_20_Text">kubectl apply -f service.yaml</text:span></text:p>
      </text:section>
      <text:p text:style-name="Text_20_body">Check Resources:</text:p>
      <text:section text:style-name="Sect1" text:name="Section27">
        <text:p text:style-name="Preformatted_20_Text"><text:bookmark text:name="code-block-viewer26"/><text:span text:style-name="Source_20_Text">kubectl get pods</text:span></text:p>
        <text:p text:style-name="P22"><text:span text:style-name="Source_20_Text">kubectl get svc</text:span></text:p>
      </text:section>
      <text:p text:style-name="Horizontal_20_Line"/>
      <text:h text:style-name="Heading_20_1" text:outline-level="1">CI/CD Flow</text:h>
      <text:h text:style-name="Heading_20_2" text:outline-level="2">CI/CD Pipeline Workflow</text:h>
      <text:section text:style-name="Sect1" text:name="Section28">
        <text:p text:style-name="Preformatted_20_Text"><text:bookmark text:name="code-block-viewer27"/><text:span text:style-name="Source_20_Text">Developer Pushes Code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 text:c="6"/>GitHub Repository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 text:c="4"/>AWS CodePipeline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 text:c="6"/>AWS CodeBuild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 text:c="4"/>Docker Image Build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/>Push Image to DockerHub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/>Deploy to AWS EKS</text:span></text:p>
        <text:p text:style-name="Preformatted_20_Text"><text:span text:style-name="Source_20_Text"><text:s text:c="10"/>|</text:span></text:p>
        <text:p text:style-name="Preformatted_20_Text"><text:span text:style-name="Source_20_Text"><text:s text:c="10"/>v</text:span></text:p>
        <text:p text:style-name="Preformatted_20_Text"><text:span text:style-name="Source_20_Text"><text:s/>Kubernetes LoadBalancer</text:span></text:p>
        <text:p text:style-name="Preformatted_20_Text"><text:span text:style-name="Source_20_Text"><text:s text:c="10"/>|</text:span></text:p>
        <text:p text:style-name="Preformatted_20_Text"><text:soft-page-break/><text:span text:style-name="Source_20_Text"><text:s text:c="10"/>v</text:span></text:p>
        <text:p text:style-name="P22"><text:span text:style-name="Source_20_Text"><text:s text:c="2"/>Application Accessible</text:span></text:p>
      </text:section>
      <text:p text:style-name="Horizontal_20_Line"/>
      <text:h text:style-name="Heading_20_1" text:outline-level="1">buildspec.yml</text:h>
      <text:section text:style-name="Sect1" text:name="Section29">
        <text:p text:style-name="Preformatted_20_Text"><text:bookmark text:name="code-block-viewer28"/><text:span text:style-name="Source_20_Text">version: 0.2</text:span></text:p>
        <text:p text:style-name="Preformatted_20_Text"><text:span text:style-name="Source_20_Text">phases:</text:span></text:p>
        <text:p text:style-name="Preformatted_20_Text"><text:span text:style-name="Source_20_Text"><text:s text:c="2"/>install:</text:span></text:p>
        <text:p text:style-name="Preformatted_20_Text"><text:span text:style-name="Source_20_Text"><text:s text:c="4"/>runtime-versions:</text:span></text:p>
        <text:p text:style-name="Preformatted_20_Text"><text:span text:style-name="Source_20_Text"><text:s text:c="6"/>nodejs: 18</text:span></text:p>
        <text:p text:style-name="Preformatted_20_Text"><text:span text:style-name="Source_20_Text"><text:s text:c="2"/>pre_build:</text:span></text:p>
        <text:p text:style-name="Preformatted_20_Text"><text:span text:style-name="Source_20_Text"><text:s text:c="4"/>commands:</text:span></text:p>
        <text:p text:style-name="Preformatted_20_Text"><text:span text:style-name="Source_20_Text"><text:s text:c="6"/>- echo Logging into DockerHub</text:span></text:p>
        <text:p text:style-name="Preformatted_20_Text"><text:span text:style-name="Source_20_Text"><text:s text:c="6"/>- docker login -u YOUR_USERNAME -p YOUR_PASSWORD</text:span></text:p>
        <text:p text:style-name="Preformatted_20_Text"><text:span text:style-name="Source_20_Text"><text:s text:c="2"/>build:</text:span></text:p>
        <text:p text:style-name="Preformatted_20_Text"><text:span text:style-name="Source_20_Text"><text:s text:c="4"/>commands:</text:span></text:p>
        <text:p text:style-name="Preformatted_20_Text"><text:span text:style-name="Source_20_Text"><text:s text:c="6"/>- echo Build Started</text:span></text:p>
        <text:p text:style-name="Preformatted_20_Text"><text:span text:style-name="Source_20_Text"><text:s text:c="6"/>- docker build -t brain-task-app .</text:span></text:p>
        <text:p text:style-name="Preformatted_20_Text"><text:span text:style-name="Source_20_Text"><text:s text:c="6"/>- docker tag brain-task-app YOUR_USERNAME/brain-task-app:latest</text:span></text:p>
        <text:p text:style-name="Preformatted_20_Text"><text:span text:style-name="Source_20_Text"><text:s text:c="2"/>post_build:</text:span></text:p>
        <text:p text:style-name="Preformatted_20_Text"><text:span text:style-name="Source_20_Text"><text:s text:c="4"/>commands:</text:span></text:p>
        <text:p text:style-name="Preformatted_20_Text"><text:span text:style-name="Source_20_Text"><text:s text:c="6"/>- echo Pushing Docker Image</text:span></text:p>
        <text:p text:style-name="Preformatted_20_Text"><text:span text:style-name="Source_20_Text"><text:s text:c="6"/>- docker push YOUR_USERNAME/brain-task-app:latest</text:span></text:p>
        <text:p text:style-name="Preformatted_20_Text"><text:span text:style-name="Source_20_Text">artifacts:</text:span></text:p>
        <text:p text:style-name="Preformatted_20_Text"><text:span text:style-name="Source_20_Text"><text:s text:c="2"/>files:</text:span></text:p>
        <text:p text:style-name="P22"><text:span text:style-name="Source_20_Text"><text:s text:c="4"/>- '**/*'</text:span></text:p>
      </text:section>
      <text:p text:style-name="Horizontal_20_Line"/>
      <text:h text:style-name="Heading_20_1" text:outline-level="1">CloudWatch Monitoring</text:h>
      <text:p text:style-name="Text_20_body">AWS CloudWatch is used to monitor:</text:p>
      <text:list xml:id="list2846354575" text:style-name="L3">
        <text:list-item>
          <text:p text:style-name="P39">CodeBuild Logs </text:p>
        </text:list-item>
        <text:list-item>
          <text:p text:style-name="P39">Pipeline Logs </text:p>
        </text:list-item>
        <text:list-item>
          <text:p text:style-name="P39">EKS Logs </text:p>
        </text:list-item>
        <text:list-item>
          <text:p text:style-name="P38">Application Logs </text:p>
        </text:list-item>
      </text:list>
      <text:p text:style-name="Text_20_body">CloudWatch helps identify deployment issues and application failures.</text:p>
      <text:p text:style-name="Horizontal_20_Line"/>
      <text:h text:style-name="Heading_20_1" text:outline-level="1">Screenshots</text:h>
      <text:p text:style-name="Text_20_body">Add the following screenshots in this section:</text:p>
      <text:list xml:id="list4053969326" text:style-name="L4">
        <text:list-item>
          <text:p text:style-name="P41">EC2 Instance Running </text:p>
        </text:list-item>
        <text:list-item>
          <text:p text:style-name="P41">Docker Images </text:p>
        </text:list-item>
        <text:list-item>
          <text:p text:style-name="P41">Docker Container Running </text:p>
        </text:list-item>
        <text:list-item>
          <text:p text:style-name="P41">DockerHub Repository </text:p>
        </text:list-item>
        <text:list-item>
          <text:p text:style-name="P41">EKS Cluster </text:p>
        </text:list-item>
        <text:list-item>
          <text:p text:style-name="P41">Kubernetes Pods </text:p>
        </text:list-item>
        <text:list-item>
          <text:p text:style-name="P41"><text:soft-page-break/>Kubernetes Services </text:p>
        </text:list-item>
        <text:list-item>
          <text:p text:style-name="P41">CodeBuild Success </text:p>
        </text:list-item>
        <text:list-item>
          <text:p text:style-name="P41">CodePipeline Success </text:p>
        </text:list-item>
        <text:list-item>
          <text:p text:style-name="P41">CloudWatch Logs </text:p>
        </text:list-item>
        <text:list-item>
          <text:p text:style-name="P40">Final Application Output</text:p>
        </text:list-item>
      </text:list>
      <text:p text:style-name="P32"><text:s text:c="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45:40.255672904</meta:creation-date>
    <dc:date>2026-05-17T15:00:58.861852222</dc:date>
    <meta:editing-duration>PT8H22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1" meta:paragraph-count="357" meta:word-count="1432" meta:character-count="11150" meta:non-whitespace-character-count="8510"/>
  </office:meta>
</office:document-meta>
</file>